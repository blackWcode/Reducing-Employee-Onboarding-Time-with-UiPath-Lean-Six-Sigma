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17" svg:stroke-opacity="100%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321" svg:stroke-opacity="100%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size="0.23611in" style:font-size-asian="0.23611in" style:font-size-complex="0.23611in" fo:language="en" fo:country="G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text-align="center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328" svg:stroke-opacity="100%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.06222in" fo:padding-bottom="0.06222in" fo:padding-left="0.10889in" fo:padding-right="0.10889in" draw:textarea-vertical-align="middle" draw:textarea-horizontal-align="center" draw:fill="gradient" draw:fill-gradient-name="a999" draw:stroke="solid" svg:stroke-width="0.01389in" svg:stroke-color="#741d6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3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1002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4">
      <style:text-properties fo:font-size="0.23611in" style:font-size-asian="0.23611in" style:font-size-complex="0.23611in" fo:language="en" fo:country="GB"/>
    </style:style>
    <style:style style:family="paragraph" style:name="a1003">
      <style:paragraph-properties fo:line-height="90%" fo:text-align="left" style:tab-stop-distance="0.68056in" fo:margin-left="0.125in" fo:margin-right="0in" fo:text-indent="-0.125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text-align="center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7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paragraph" style:name="a1006">
      <style:paragraph-properties fo:line-height="90%" fo:text-align="left" style:tab-stop-distance="0.68056in" fo:margin-left="0.125in" fo:margin-right="0in" fo:text-indent="-0.125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38">
      <style:table-row-properties style:row-height="1.0094in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size="0.23611in" style:font-size-asian="0.23611in" style:font-size-complex="0.23611in" fo:language="en" fo:country="GB"/>
    </style:style>
    <style:style style:family="text" style:name="a1008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0%" fo:text-align="left" style:tab-stop-distance="0.68056in" fo:margin-left="0.125in" fo:margin-right="0in" fo:text-indent="-0.125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solid" draw:fill-color="#0b76a0" draw:opacity="100%" draw:stroke="solid" svg:stroke-width="0.02083in" svg:stroke-color="#0b76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8167in" fo:padding-bottom="0.1225in" fo:padding-left="0.08167in" fo:padding-right="0.10889in" draw:textarea-vertical-align="top" draw:textarea-horizontal-align="left" draw:fill="solid" draw:fill-color="#d2b5cd" draw:opacity="90%" draw:stroke="solid" svg:stroke-width="0.01389in" svg:stroke-color="#d2b5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335" svg:stroke-opacity="100%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42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1011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size="0.23611in" style:font-size-asian="0.23611in" style:font-size-complex="0.23611in" fo:language="en" fo:country="GB"/>
    </style:style>
    <style:style style:family="paragraph" style:name="a1012">
      <style:paragraph-properties fo:line-height="90%" fo:text-align="left" style:tab-stop-distance="0.68056in" fo:margin-left="0.125in" fo:margin-right="0in" fo:text-indent="-0.125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46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1015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size="0.23611in" style:font-size-asian="0.23611in" style:font-size-complex="0.23611in" fo:language="en" fo:country="GB"/>
    </style:style>
    <style:style style:family="paragraph" style:name="a1016">
      <style:paragraph-properties fo:line-height="90%" fo:text-align="left" style:tab-stop-distance="0.68056in" fo:margin-left="0.125in" fo:margin-right="0in" fo:text-indent="-0.125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text-align="center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8167in" fo:padding-bottom="0.1225in" fo:padding-left="0.08167in" fo:padding-right="0.10889in" draw:textarea-vertical-align="top" draw:textarea-horizontal-align="left" draw:fill="solid" draw:fill-color="#d2b5cd" draw:opacity="90%" draw:stroke="solid" svg:stroke-width="0.01389in" svg:stroke-color="#d2b5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0">
      <style:graphic-properties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869">
      <style:table-properties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 style:parent-style-name="Graphics">
      <style:graphic-properties draw:fill="solid" draw:fill-color="#ededed" draw:opacity="100%" draw:stroke="solid" svg:stroke-width="0.09722in" svg:stroke-color="#78206e" svg:stroke-opacity="100%" draw:stroke-linejoin="miter" svg:stroke-linecap="square" draw:shadow="visible" draw:shadow-offset-x="0in" draw:shadow-offset-y="0.01969in" draw:shadow-color="#000000" draw:shadow-opacity="40%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342" svg:stroke-opacity="100%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0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able-column" style:name="a870">
      <style:table-column-properties style:column-width="3.23002in"/>
    </style:style>
    <style:style style:family="text" style:name="a1451">
      <style:text-properties fo:font-size="0.23611in" style:font-size-asian="0.23611in" style:font-size-complex="0.23611in" fo:language="en" fo:country="GB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71">
      <style:table-column-properties style:column-width="3.23002in"/>
    </style:style>
    <style:style style:family="paragraph" style:name="a1452">
      <style:paragraph-properties fo:text-align="center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72">
      <style:table-column-properties style:column-width="3.23002in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73">
      <style:table-column-properties style:column-width="3.23002in"/>
    </style:style>
    <style:style style:family="table-cell" style:name="a1454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paragraph" style:name="a102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4">
      <style:table-row-properties style:row-height="0.30636in"/>
    </style:style>
    <style:style style:family="table-row" style:name="a1455">
      <style:table-row-properties style:row-height="1.02047in"/>
    </style:style>
    <style:style style:family="text" style:name="a875">
      <style:text-properties fo:color="#ffffff" fo:font-size="0.19444in" style:font-size-asian="0.19444in" style:font-size-complex="0.19444in" fo:language="en" fo:country="GB" fo:font-weight="bold" style:font-weight-asian="bold" style:font-weight-complex="bold"/>
    </style:style>
    <style:style style:family="text" style:name="a1456">
      <style:text-properties fo:font-size="0.23611in" style:font-size-asian="0.23611in" style:font-size-complex="0.23611in" fo:language="en" fo:country="GB"/>
    </style:style>
    <style:style style:family="graphic" style:name="a1025">
      <style:graphic-properties fo:wrap-option="wrap" fo:padding-top="0.07111in" fo:padding-bottom="0.07111in" fo:padding-left="0.12444in" fo:padding-right="0.12444in" draw:textarea-vertical-align="middle" draw:textarea-horizontal-align="center" draw:fill="gradient" draw:fill-gradient-name="a1024" draw:stroke="solid" svg:stroke-width="0.01389in" svg:stroke-color="#b242a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color="#ffffff" fo:font-size="0.19444in" style:font-size-asian="0.19444in" style:font-size-complex="0.19444in" fo:language="en" fo:country="GB"/>
    </style:style>
    <style:style style:family="paragraph" style:name="a1457">
      <style:paragraph-properties/>
    </style:style>
    <style:style style:family="text" style:name="a1026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/>
    </style:style>
    <style:style style:family="text" style:name="a1027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9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paragraph" style:name="a1028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9">
      <style:table-cell-properties style:vertical-align="middle" fo:background-color="#0b76a0" fo:padding-top="0.05in" fo:padding-bottom="0.05in" fo:padding-left="0.1in" fo:padding-right="0.1in"/>
      <style:paragraph-properties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draw:fill="none" draw:stroke="solid" svg:stroke-width="0.01389in" svg:stroke-color="#000000" svg:stroke-opacity="100%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22184in" draw:shadow-offset-y="0.16717in" draw:shadow-color="#000000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 style:parent-style-name="Graphics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 style:parent-style-name="Graphics">
      <style:graphic-properties draw:fill="none" draw:stroke="non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 style:parent-style-name="Graphics">
      <style:graphic-properties draw:fill="none" draw:stroke="non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4" style:parent-style-name="Graphics">
      <style:graphic-properties draw:fill="none" draw:stroke="none"/>
    </style:style>
    <style:style style:family="graphic" style:name="a1355" style:parent-style-name="Graphics">
      <style:graphic-properties draw:fill="none" draw:stroke="non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size="0.23611in" style:font-size-asian="0.23611in" style:font-size-complex="0.23611in" fo:language="en" fo:country="GB"/>
    </style:style>
    <style:style style:family="text" style:name="a880">
      <style:text-properties fo:color="#ffffff" fo:font-size="0.19444in" style:font-size-asian="0.19444in" style:font-size-complex="0.19444in" fo:language="en" fo:country="GB" fo:font-weight="bold" style:font-weight-asian="bold" style:font-weight-complex="bold"/>
    </style:style>
    <style:style style:family="paragraph" style:name="a1461">
      <style:paragraph-properties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color="#ffffff" fo:font-size="0.19444in" style:font-size-asian="0.19444in" style:font-size-complex="0.19444in" fo:language="en" fo:country="GB"/>
    </style:style>
    <style:style style:family="text" style:name="a1031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3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paragraph" style:name="a882">
      <style:paragraph-properties/>
    </style:style>
    <style:style style:family="text" style:name="a1464">
      <style:text-properties fo:font-size="0.23611in" style:font-size-asian="0.23611in" style:font-size-complex="0.23611in" fo:language="en" fo:country="GB"/>
    </style:style>
    <style:style style:family="text" style:name="a1034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text-align="center"/>
    </style:style>
    <style:style style:family="table-cell" style:name="a884">
      <style:table-cell-properties style:vertical-align="middle" fo:background-color="#0b76a0" fo:padding-top="0.05in" fo:padding-bottom="0.05in" fo:padding-left="0.1in" fo:padding-right="0.1in"/>
      <style:paragraph-properties style:writing-mode="lr-tb"/>
    </style:style>
    <style:style style:family="text" style:name="a1035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color="#ffffff" fo:font-size="0.19444in" style:font-size-asian="0.19444in" style:font-size-complex="0.19444in" fo:language="en" fo:country="GB" fo:font-weight="bold" style:font-weight-asian="bold" style:font-weight-complex="bold"/>
    </style:style>
    <style:style style:family="paragraph" style:name="a1036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7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886">
      <style:text-properties fo:color="#ffffff" fo:font-size="0.19444in" style:font-size-asian="0.19444in" style:font-size-complex="0.19444in" fo:language="en" fo:country="GB"/>
    </style:style>
    <style:style style:family="paragraph" style:name="a887">
      <style:paragraph-properties/>
    </style:style>
    <style:style style:family="text" style:name="a1468">
      <style:text-properties fo:font-size="0.23611in" style:font-size-asian="0.23611in" style:font-size-complex="0.23611in" fo:language="en" fo:country="GB"/>
    </style:style>
    <style:style style:family="text" style:name="a1038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text-align="center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89">
      <style:table-cell-properties style:vertical-align="middle" fo:background-color="#0b76a0" fo:padding-top="0.05in" fo:padding-bottom="0.05in" fo:padding-left="0.1in" fo:padding-right="0.1in"/>
      <style:paragraph-properties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5" style:parent-style-name="Graphics">
      <style:graphic-properties draw:fill="none" draw:stroke="non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72f" draw:opacity="100%" draw:stroke="solid" svg:stroke-width="0.01042in" svg:stroke-color="#e97132" svg:stroke-opacity="100%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57" svg:stroke-opacity="100%" draw:auto-grow-width="false" draw:auto-grow-height="false"/>
      <style:paragraph-properties style:font-independent-line-spacing="true" style:writing-mode="lr-tb"/>
    </style:style>
    <style:style style:family="graphic" style:name="a1360" style:parent-style-name="Graphics">
      <style:graphic-properties draw:fill="none" draw:stroke="non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61">
      <style:table-properties style:writing-mode="lr-tb"/>
    </style:style>
    <style:style style:family="table-column" style:name="a1362">
      <style:table-column-properties style:column-width="2.60958in"/>
    </style:style>
    <style:style style:family="table-column" style:name="a1363">
      <style:table-column-properties style:column-width="4.69282in"/>
    </style:style>
    <style:style style:family="table-column" style:name="a1364">
      <style:table-column-properties style:column-width="1.44086in"/>
    </style:style>
    <style:style style:family="table-column" style:name="a1365">
      <style:table-column-properties style:column-width="2.37593in"/>
    </style:style>
    <style:style style:family="table-row" style:name="a1366">
      <style:table-row-properties style:row-height="0.40745in"/>
    </style:style>
    <style:style style:family="text" style:name="a1367">
      <style:text-properties fo:font-size="0.23611in" style:font-size-asian="0.23611in" style:font-size-complex="0.23611in" fo:language="en" fo:country="GB" fo:font-weight="bold" style:font-weight-asian="bold" style:font-weight-complex="bold"/>
    </style:style>
    <style:style style:family="text" style:name="a1368">
      <style:text-properties fo:font-size="0.23611in" style:font-size-asian="0.23611in" style:font-size-complex="0.23611in" fo:language="en" fo:country="GB"/>
    </style:style>
    <style:style style:family="paragraph" style:name="a1040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1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paragraph" style:name="a1369">
      <style:paragraph-properties fo:text-align="center"/>
    </style:style>
    <style:style style:family="text" style:name="a890">
      <style:text-properties fo:color="#ffffff" fo:font-size="0.19444in" style:font-size-asian="0.19444in" style:font-size-complex="0.19444in" fo:language="en" fo:country="GB" fo:font-weight="bold" style:font-weight-asian="bold" style:font-weight-complex="bold"/>
    </style:style>
    <style:style style:family="text" style:name="a891">
      <style:text-properties fo:color="#ffffff" fo:font-size="0.19444in" style:font-size-asian="0.19444in" style:font-size-complex="0.19444in" fo:language="en" fo:country="G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8167in" fo:padding-bottom="0.1225in" fo:padding-left="0.08167in" fo:padding-right="0.10889in" draw:textarea-vertical-align="top" draw:textarea-horizontal-align="left" draw:fill="solid" draw:fill-color="#d2b5cd" draw:opacity="90%" draw:stroke="solid" svg:stroke-width="0.01389in" svg:stroke-color="#d2b5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4">
      <style:table-cell-properties style:vertical-align="middle" fo:background-color="#0b76a0" fo:padding-top="0.05in" fo:padding-bottom="0.05in" fo:padding-left="0.1in" fo:padding-right="0.1in"/>
      <style:paragraph-properties style:writing-mode="lr-tb"/>
    </style:style>
    <style:style style:family="table-row" style:name="a895">
      <style:table-row-properties style:row-height="0.54375in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6">
      <style:graphic-properties fo:wrap-option="wrap" fo:padding-top="0.07111in" fo:padding-bottom="0.07111in" fo:padding-left="0.12444in" fo:padding-right="0.12444in" draw:textarea-vertical-align="middle" draw:textarea-horizontal-align="center" draw:fill="gradient" draw:fill-gradient-name="a1045" draw:stroke="solid" svg:stroke-width="0.01389in" svg:stroke-color="#c59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size="0.19444in" style:font-size-asian="0.19444in" style:font-size-complex="0.19444in" fo:language="en" fo:country="GB" fo:font-weight="bold" style:font-weight-asian="bold" style:font-weight-complex="bold"/>
    </style:style>
    <style:style style:family="text" style:name="a1047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size="0.19444in" style:font-size-asian="0.19444in" style:font-size-complex="0.19444in" fo:language="en" fo:country="GB"/>
    </style:style>
    <style:style style:family="text" style:name="a1048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/>
    </style:style>
    <style:style style:family="paragraph" style:name="a104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61" svg:stroke-opacity="100%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65" svg:stroke-opacity="100%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1">
      <style:table-cell-properties style:vertical-align="middle" fo:background-color="#275317" fo:padding-top="0.04665in" fo:padding-bottom="0.04665in" fo:padding-left="0.09331in" fo:padding-right="0.09331in"/>
      <style:paragraph-properties style:writing-mode="lr-tb"/>
    </style:style>
    <style:style style:family="text" style:name="a1372">
      <style:text-properties fo:font-size="0.23611in" style:font-size-asian="0.23611in" style:font-size-complex="0.23611in" fo:language="en" fo:country="GB" fo:font-weight="bold" style:font-weight-asian="bold" style:font-weight-complex="bold"/>
    </style:style>
    <style:style style:family="text" style:name="a1373">
      <style:text-properties fo:font-size="0.23611in" style:font-size-asian="0.23611in" style:font-size-complex="0.23611in" fo:language="en" fo:country="GB"/>
    </style:style>
    <style:style style:family="paragraph" style:name="a1374">
      <style:paragraph-properties fo:text-align="center"/>
    </style:style>
    <style:style style:family="table-cell" style:name="a1376">
      <style:table-cell-properties style:vertical-align="middle" fo:background-color="#275317" fo:padding-top="0.04665in" fo:padding-bottom="0.04665in" fo:padding-left="0.09331in" fo:padding-right="0.09331in"/>
      <style:paragraph-properties style:writing-mode="lr-tb"/>
    </style:style>
    <style:style style:family="text" style:name="a1377">
      <style:text-properties fo:font-size="0.23611in" style:font-size-asian="0.23611in" style:font-size-complex="0.23611in" fo:language="en" fo:country="GB" fo:font-weight="bold" style:font-weight-asian="bold" style:font-weight-complex="bold"/>
    </style:style>
    <style:style style:family="text" style:name="a1378">
      <style:text-properties fo:font-size="0.23611in" style:font-size-asian="0.23611in" style:font-size-complex="0.23611in" fo:language="en" fo:country="GB"/>
    </style:style>
    <style:style style:family="paragraph" style:name="a1379">
      <style:paragraph-properties fo:text-align="center"/>
    </style:style>
    <style:style style:family="text" style:name="a1051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69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73" svg:stroke-opacity="100%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77" svg:stroke-opacity="100%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1">
      <style:table-cell-properties style:vertical-align="middle" fo:background-color="#275317" fo:padding-top="0.04665in" fo:padding-bottom="0.04665in" fo:padding-left="0.09331in" fo:padding-right="0.09331in"/>
      <style:paragraph-properties style:writing-mode="lr-tb"/>
    </style:style>
    <style:style style:family="text" style:name="a1382">
      <style:text-properties fo:font-size="0.23611in" style:font-size-asian="0.23611in" style:font-size-complex="0.23611in" fo:language="en" fo:country="GB" fo:font-weight="bold" style:font-weight-asian="bold" style:font-weight-complex="bold"/>
    </style:style>
    <style:style style:family="text" style:name="a1383">
      <style:text-properties fo:font-size="0.23611in" style:font-size-asian="0.23611in" style:font-size-complex="0.23611in" fo:language="en" fo:country="GB"/>
    </style:style>
    <style:style style:family="paragraph" style:name="a1384">
      <style:paragraph-properties fo:text-align="center"/>
    </style:style>
    <style:style style:family="table-cell" style:name="a1386">
      <style:table-cell-properties style:vertical-align="middle" fo:background-color="#275317" fo:padding-top="0.04665in" fo:padding-bottom="0.04665in" fo:padding-left="0.09331in" fo:padding-right="0.09331in"/>
      <style:paragraph-properties style:writing-mode="lr-tb"/>
    </style:style>
    <style:style style:family="table-row" style:name="a1387">
      <style:table-row-properties style:row-height="1.02047in"/>
    </style:style>
    <style:style style:family="text" style:name="a1388">
      <style:text-properties fo:font-size="0.23611in" style:font-size-asian="0.23611in" style:font-size-complex="0.23611in" fo:language="en" fo:country="GB"/>
    </style:style>
    <style:style style:family="text" style:name="a1060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/>
    </style:style>
    <style:style style:family="paragraph" style:name="a106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8167in" fo:padding-bottom="0.1225in" fo:padding-left="0.08167in" fo:padding-right="0.10889in" draw:textarea-vertical-align="top" draw:textarea-horizontal-align="left" draw:fill="solid" draw:fill-color="#d2b5cd" draw:opacity="90%" draw:stroke="solid" svg:stroke-width="0.01389in" svg:stroke-color="#d2b5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81" svg:stroke-opacity="100%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465a4" draw:marker-end="a1285" svg:stroke-opacity="100%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1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1392">
      <style:text-properties fo:font-size="0.23611in" style:font-size-asian="0.23611in" style:font-size-complex="0.23611in" fo:language="en" fo:country="GB"/>
    </style:style>
    <style:style style:family="paragraph" style:name="a1393">
      <style:paragraph-properties/>
    </style:style>
    <style:style style:family="table-cell" style:name="a1395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1396">
      <style:text-properties fo:font-size="0.23611in" style:font-size-asian="0.23611in" style:font-size-complex="0.23611in" fo:language="en" fo:country="GB"/>
    </style:style>
    <style:style style:family="paragraph" style:name="a1397">
      <style:paragraph-properties fo:text-align="center"/>
    </style:style>
    <style:style style:family="paragraph" style:name="a1070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9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graphic" style:name="a1072">
      <style:graphic-properties fo:wrap-option="wrap" fo:padding-top="0.08in" fo:padding-bottom="0.08in" fo:padding-left="0.14in" fo:padding-right="0.14in" draw:textarea-vertical-align="middle" draw:textarea-horizontal-align="center" draw:fill="gradient" draw:fill-gradient-name="a1071" draw:stroke="solid" svg:stroke-width="0.01389in" svg:stroke-color="#c59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8167in" fo:padding-bottom="0.1225in" fo:padding-left="0.08167in" fo:padding-right="0.10889in" draw:textarea-vertical-align="top" draw:textarea-horizontal-align="left" draw:fill="solid" draw:fill-color="#d2b5cd" draw:opacity="90%" draw:stroke="solid" svg:stroke-width="0.01389in" svg:stroke-color="#d2b5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7111in" fo:padding-bottom="0.07111in" fo:padding-left="0.12444in" fo:padding-right="0.12444in" draw:textarea-vertical-align="middle" draw:textarea-horizontal-align="center" draw:fill="gradient" draw:fill-gradient-name="a1097" draw:stroke="solid" svg:stroke-width="0.01389in" svg:stroke-color="#b242a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1">
      <style:text-properties fo:font-size="0.19444in" style:font-size-asian="0.19444in" style:font-size-complex="0.19444in" fo:language="en" fo:country="GB"/>
    </style:style>
    <style:style style:family="paragraph" style:name="a902">
      <style:paragraph-properties/>
    </style:style>
    <style:style style:family="table-cell" style:name="a9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5">
      <style:text-properties fo:font-size="0.19444in" style:font-size-asian="0.19444in" style:font-size-complex="0.19444in" fo:language="en" fo:country="GB"/>
    </style:style>
    <style:style style:family="text" style:name="a906">
      <style:text-properties fo:font-size="0.19444in" style:font-size-asian="0.19444in" style:font-size-complex="0.19444in" fo:language="en" fo:country="GB"/>
    </style:style>
    <style:style style:family="text" style:name="a907">
      <style:text-properties fo:font-size="0.19444in" style:font-size-asian="0.19444in" style:font-size-complex="0.19444in" fo:language="en" fo:country="GB"/>
    </style:style>
    <style:style style:family="text" style:name="a908">
      <style:text-properties fo:font-size="0.19444in" style:font-size-asian="0.19444in" style:font-size-complex="0.19444in" fo:language="en" fo:country="GB"/>
    </style:style>
    <style:style style:family="paragraph" style:name="a909">
      <style:paragraph-properties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2">
      <style:text-properties fo:font-size="0.19444in" style:font-size-asian="0.19444in" style:font-size-complex="0.19444in" fo:language="en" fo:country="GB"/>
    </style:style>
    <style:style style:family="paragraph" style:name="a913">
      <style:paragraph-properties/>
    </style:style>
    <style:style style:family="table-cell" style:name="a9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16">
      <style:table-row-properties style:row-height="0.54375in"/>
    </style:style>
    <style:style style:family="text" style:name="a917">
      <style:text-properties fo:font-size="0.19444in" style:font-size-asian="0.19444in" style:font-size-complex="0.19444in" fo:language="en" fo:country="GB" fo:font-weight="bold" style:font-weight-asian="bold" style:font-weight-complex="bold"/>
    </style:style>
    <style:style style:family="text" style:name="a918">
      <style:text-properties fo:font-size="0.19444in" style:font-size-asian="0.19444in" style:font-size-complex="0.19444in" fo:language="en" fo:country="GB"/>
    </style:style>
    <style:style style:family="paragraph" style:name="a919">
      <style:paragraph-properties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813" svg:stroke-width="0.13889in" svg:stroke-color="#0f9ed5" svg:stroke-opacity="100%" draw:stroke-linejoin="miter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2">
      <style:text-properties fo:font-size="0.19444in" style:font-size-asian="0.19444in" style:font-size-complex="0.19444in" fo:language="en" fo:country="GB"/>
    </style:style>
    <style:style style:family="paragraph" style:name="a923">
      <style:paragraph-properties/>
    </style:style>
    <style:style style:family="table-cell" style:name="a9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6">
      <style:text-properties fo:font-size="0.19444in" style:font-size-asian="0.19444in" style:font-size-complex="0.19444in" fo:language="en" fo:country="GB"/>
    </style:style>
    <style:style style:family="paragraph" style:name="a927">
      <style:paragraph-properties/>
    </style:style>
    <style:style style:family="table-cell" style:name="a9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00">
      <style:text-properties fo:font-size="0.23611in" style:font-size-asian="0.23611in" style:font-size-complex="0.23611in" fo:language="en" fo:country="GB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401">
      <style:paragraph-properties fo:text-align="center"/>
    </style:style>
    <style:style style:family="graphic" style:name="a821" style:parent-style-name="Graphics">
      <style:graphic-properties draw:fill="none" fo:clip="rect(0in, 0.49785in, -0.00016in, 0.36511in)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03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paragraph" style:name="a82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04">
      <style:table-row-properties style:row-height="1.02047in"/>
    </style:style>
    <style:style style:family="text" style:name="a1405">
      <style:text-properties fo:font-size="0.23611in" style:font-size-asian="0.23611in" style:font-size-complex="0.23611in" fo:language="en" fo:country="G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8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930">
      <style:text-properties fo:font-size="0.19444in" style:font-size-asian="0.19444in" style:font-size-complex="0.19444in" fo:language="en" fo:country="GB"/>
    </style:style>
    <style:style style:family="text" style:name="a1409">
      <style:text-properties fo:font-size="0.23611in" style:font-size-asian="0.23611in" style:font-size-complex="0.23611in" fo:language="en" fo:country="G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/>
    </style:style>
    <style:style style:family="table-cell" style:name="a9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34">
      <style:table-row-properties style:row-height="0.54375in"/>
    </style:style>
    <style:style style:family="text" style:name="a935">
      <style:text-properties fo:font-size="0.19444in" style:font-size-asian="0.19444in" style:font-size-complex="0.19444in" fo:language="en" fo:country="GB" fo:font-weight="bold" style:font-weight-asian="bold" style:font-weight-complex="bold"/>
    </style:style>
    <style:style style:family="text" style:name="a936">
      <style:text-properties fo:font-size="0.19444in" style:font-size-asian="0.19444in" style:font-size-complex="0.19444in" fo:language="en" fo:country="GB"/>
    </style:style>
    <style:style style:family="paragraph" style:name="a937">
      <style:paragraph-properties/>
    </style:style>
    <style:style style:family="table-cell" style:name="a9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/>
    </style:style>
    <style:style style:family="paragraph" style:name="a83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2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size="0.23611in" style:font-size-asian="0.23611in" style:font-size-complex="0.23611in" fo:language="en" fo:country="GB"/>
    </style:style>
    <style:style style:family="paragraph" style:name="a83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text-align="center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6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paragraph" style:name="a83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size="0.23611in" style:font-size-asian="0.23611in" style:font-size-complex="0.23611in" fo:language="en" fo:country="GB"/>
    </style:style>
    <style:style style:family="paragraph" style:name="a1418">
      <style:paragraph-properties fo:text-align="center"/>
    </style:style>
    <style:style style:family="text" style:name="a940">
      <style:text-properties fo:font-size="0.19444in" style:font-size-asian="0.19444in" style:font-size-complex="0.19444in" fo:language="en" fo:country="GB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4">
      <style:text-properties fo:font-size="0.19444in" style:font-size-asian="0.19444in" style:font-size-complex="0.19444in" fo:language="en" fo:country="GB"/>
    </style:style>
    <style:style style:family="paragraph" style:name="a945">
      <style:paragraph-properties/>
    </style:style>
    <style:style style:family="table-cell" style:name="a9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8">
      <style:text-properties fo:font-size="0.19444in" style:font-size-asian="0.19444in" style:font-size-complex="0.19444in" fo:language="en" fo:country="G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420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graphic" style:name="a840" style:parent-style-name="Graphics">
      <style:graphic-properties draw:fill="none" draw:stroke="none"/>
    </style:style>
    <style:style style:family="table-row" style:name="a1421">
      <style:table-row-properties style:row-height="0.71396in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size="0.23611in" style:font-size-asian="0.23611in" style:font-size-complex="0.23611in" fo:language="en" fo:country="G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25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845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size="0.23611in" style:font-size-asian="0.23611in" style:font-size-complex="0.23611in" fo:language="en" fo:country="GB"/>
    </style:style>
    <style:style style:family="text" style:name="a846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/>
    </style:style>
    <style:style style:family="text" style:name="a847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29">
      <style:table-cell-properties style:vertical-align="middle" fo:padding-top="0.04665in" fo:padding-bottom="0.04665in" fo:padding-left="0.09331in" fo:padding-right="0.09331in"/>
      <style:paragraph-properties style:writing-mode="lr-tb"/>
    </style:style>
    <style:style style:family="text" style:name="a1100">
      <style:text-properties fo:font-variant="normal" fo:text-transform="none" fo:color="#5016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01">
      <style:paragraph-properties fo:line-height="0.23333in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10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1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41"/>
    <text:list-style style:name="a117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83"/>
    <text:list-style style:name="a1445"/>
    <text:list-style style:name="a106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88"/>
    <text:list-style style:name="a1449"/>
    <text:list-style style:name="a106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11"/>
    <text:list-style style:name="a114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15"/>
    <text:list-style style:name="a103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32"/>
    <text:list-style style:name="a1419"/>
    <text:list-style style:name="a111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370"/>
    <text:list-style style:name="a111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38"/>
    <text:list-style style:name="a111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375"/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453"/>
    <text:list-style style:name="a11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3"/>
    <text:list-style style:name="a903"/>
    <text:list-style style:name="a100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58"/>
    <text:list-style style:name="a107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99"/>
    <text:list-style style:name="a9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24"/>
    <text:list-style style:name="a104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428"/>
    <text:list-style style:name="a942"/>
    <text:list-style style:name="a946"/>
    <text:list-style style:name="a1380"/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385"/>
    <text:list-style style:name="a12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462"/>
    <text:list-style style:name="a910"/>
    <text:list-style style:name="a120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1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14"/>
    <text:list-style style:name="a1466"/>
    <text:list-style style:name="a101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16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16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32"/>
    <text:list-style style:name="a105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1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36"/>
    <text:list-style style:name="a950"/>
    <text:list-style style:name="a105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78"/>
    <text:list-style style:name="a105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390"/>
    <text:list-style style:name="a121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02"/>
    <text:list-style style:name="a1394"/>
    <text:list-style style:name="a1470"/>
    <text:list-style style:name="a920"/>
    <text:list-style style:name="a1407"/>
    <text:list-style style:name="a1398"/>
    <text:list-style style:name="a109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24"/>
    <text:list-style style:name="a110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28"/>
  </office:automatic-styles>
  <office:body>
    <office:presentation>
      <draw:page draw:name="Slide2" draw:style-name="a807" draw:master-page-name="Master1-Layout7-blank-Blank" presentation:presentation-page-layout-name="Master1-PPL7" draw:id="Slide-257">
        <draw:custom-shape svg:x="0in" svg:y="0in" svg:width="13.33333in" svg:height="7.5in" draw:id="id69" draw:style-name="a810" draw:name="Rectangle 89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26761in" svg:height="3.26761in" draw:id="id70" draw:style-name="a814" draw:transform="translate(-1.6338in -1.6338in) rotate(-5.12917) translate(11.07316in 2.17021in)" draw:name="Arc 91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40.6974, -210.3487, -180" draw:modifiers="150.6974 27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71" draw:style-name="a817" draw:name="TextBox 11" svg:x="6.44681in" svg:y="0.52438in" svg:width="5.96986in" svg:height="1.44965in">
          <draw:text-box>
            <text:p text:style-name="a816" text:class-names="" text:cond-style-name=""><text:span text:style-name="a815" text:class-names="">HR Onboarding Process Improvement</text:span></text:p>
          </draw:text-box>
          <svg:title/>
          <svg:desc/>
        </draw:frame>
        <draw:custom-shape svg:x="0in" svg:y="6in" svg:width="2.92308in" svg:height="1.5in" draw:id="id72" draw:style-name="a820" draw:name="Freeform: Shape 9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672863 1371600" draw:enhanced-path="M 1721734 0 C 2026863 0 2313937 77299 2564444 213382 L 2672863 279248 2672863 1371600 0 1371600 33268 1242216 C 257110 522539 928399 0 1721734 0 Z N" draw:text-areas="?f28 ?f30 ?f29 ?f31" draw:glue-points="?f18 ?f19 ?f20 ?f21 ?f22 ?f23 ?f22 ?f24 ?f25 ?f24 ?f26 ?f27 ?f18 ?f19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72863"/>
            <draw:equation draw:name="f7" draw:formula="?f4 / 1371600"/>
            <draw:equation draw:name="f8" draw:formula="1721734 * ?f5 / 2672863"/>
            <draw:equation draw:name="f9" draw:formula="0 * ?f4 / 1371600"/>
            <draw:equation draw:name="f10" draw:formula="2564444 * ?f5 / 2672863"/>
            <draw:equation draw:name="f11" draw:formula="213382 * ?f4 / 1371600"/>
            <draw:equation draw:name="f12" draw:formula="2672863 * ?f5 / 2672863"/>
            <draw:equation draw:name="f13" draw:formula="279248 * ?f4 / 1371600"/>
            <draw:equation draw:name="f14" draw:formula="1371600 * ?f4 / 1371600"/>
            <draw:equation draw:name="f15" draw:formula="0 * ?f5 / 2672863"/>
            <draw:equation draw:name="f16" draw:formula="33268 * ?f5 / 2672863"/>
            <draw:equation draw:name="f17" draw:formula="1242216 * ?f4 / 137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frame draw:id="id73" draw:style-name="a821" draw:name="Picture 4" svg:x="0.79674in" svg:y="0.55916in" svg:width="5.16915in" svg:height="6.19605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838" draw:name="TextBox 5" svg:x="6.44681in" svg:y="2.17021in" svg:width="5.96986in" svg:height="4.585in">
          <draw:text-box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Business Analyst: Camila Kavanagh</text:span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1" draw:style-name="a839" draw:master-page-name="Master1-Layout1-title-Title-Slide" presentation:presentation-page-layout-name="Master1-PPL1" draw:id="Slide-256">
        <draw:frame draw:id="id75" draw:style-name="a840" draw:name="Picture 12" svg:x="12.11762in" svg:y="0in" svg:width="1.21571in" svg:height="1.21571in" style:rel-width="scale" style:rel-height="scale">
          <draw:image xlink:href="media/image2.png" xlink:type="simple" xlink:show="embed" xlink:actuate="onLoad"/>
          <svg:title/>
          <svg:desc>A logo for a company

AI-generated content may be incorrect.</svg:desc>
        </draw:frame>
        <draw:frame draw:id="id76" draw:style-name="a843" draw:name="TextBox 4" svg:x="6.10502in" svg:y="0.54142in" svg:width="0.96918in" svg:height="0.40391in">
          <draw:text-box>
            <text:p text:style-name="a842" text:class-names="" text:cond-style-name=""><text:span text:style-name="a841" text:class-names="">Define</text:span></text:p>
          </draw:text-box>
          <svg:title/>
          <svg:desc/>
        </draw:frame>
        <draw:frame draw:id="id77" draw:style-name="a853" draw:name="TextBox 5" svg:x="4.84247in" svg:y="0.1315in" svg:width="5.64384in" svg:height="0.90879in">
          <draw:text-box>
            <text:p text:style-name="a850" text:class-names="" text:cond-style-name=""><text:span text:style-name="a844" text:class-names="">The</text:span><text:span text:style-name="a845" text:class-names=""><text:s text:c="1"/></text:span><text:span text:style-name="a846" text:class-names="">project</text:span><text:span text:style-name="a847" text:class-names=""><text:s text:c="1"/></text:span><text:span text:style-name="a848" text:class-names="">objective</text:span><text:span text:style-name="a849" text:class-names=""/></text:p>
            <text:p text:style-name="a852" text:class-names="" text:cond-style-name=""><text:span text:style-name="a851" text:class-names=""/></text:p>
          </draw:text-box>
          <svg:title/>
          <svg:desc/>
        </draw:frame>
        <draw:custom-shape svg:x="0.10332in" svg:y="0.92697in" svg:width="13.1267in" svg:height="0.90879in" draw:id="id78" draw:style-name="a859" draw:name="Rectangle 7">
          <svg:title/>
          <svg:desc/>
          <text:p text:style-name="a855" text:class-names="" text:cond-style-name=""><text:span text:style-name="a854" text:class-names="">Description:<text:s text:c="1"/></text:span></text:p>
          <text:p text:style-name="a858" text:class-names="" text:cond-style-name=""><text:span text:style-name="a856" text:class-names="">FuturaCore Ltd. is a growing mid-sized tech company with 500+ employees across three locations. Their HR team is overwhelmed by the manual onboarding process.</text:span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864" draw:name="TextBox 8" svg:x="0.06685in" svg:y="1.7956in" svg:width="1.58334in" svg:height="0.40391in">
          <draw:text-box>
            <text:p text:style-name="a863" text:class-names="" text:cond-style-name=""><text:span text:style-name="a860" text:class-names="">Problem</text:span><text:span text:style-name="a861" text:class-names=""><text:s text:c="1"/>:</text:span><text:span text:style-name="a862" text:class-names=""/></text:p>
          </draw:text-box>
          <svg:title/>
          <svg:desc/>
        </draw:frame>
        <draw:frame draw:id="id80" draw:style-name="a868" draw:name="TextBox 10" svg:x="0.20663in" svg:y="4.3989in" svg:width="6.83562in" svg:height="0.40391in">
          <draw:text-box>
            <text:p text:style-name="a867" text:class-names="" text:cond-style-name=""><text:span text:style-name="a865" text:class-names="">Business Case<text:s text:c="1"/></text:span><text:span text:style-name="a866" text:class-names=""/></text:p>
          </draw:text-box>
          <svg:title/>
          <svg:desc/>
        </draw:frame>
        <draw:frame draw:id="id81" draw:name="Table 14" svg:x="0.20663in" svg:y="2.21998in" svg:width="12.92007in" svg:height="2.03333in">
          <table:table table:style-name="a869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870" table:default-cell-style-name=""/>
            <table:table-column table:style-name="a871" table:default-cell-style-name=""/>
            <table:table-column table:style-name="a872" table:default-cell-style-name=""/>
            <table:table-column table:style-name="a873" table:default-cell-style-name=""/>
            <table:table-row table:style-name="a874" table:default-cell-style-name="">
              <table:table-cell table:style-name="a879">
                <text:list text:style-name="a878">
                  <text:list-item>
                    <text:p text:style-name="a877" text:class-names="" text:cond-style-name=""><text:span text:style-name="a875" text:class-names="">What are we trying to realize?</text:span><text:span text:style-name="a876" text:class-names=""/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0" text:class-names="">Indicators</text:span><text:span text:style-name="a881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5" text:class-names="">Actual Performance</text:span><text:span text:style-name="a886" text:class-names=""/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0" text:class-names="">Goal</text:span><text:span text:style-name="a891" text:class-names=""/></text:p>
                  </text:list-item>
                </text:list>
              </table:table-cell>
            </table:table-row>
            <table:table-row table:style-name="a895" table:default-cell-style-name="">
              <table:table-cell table:style-name="a900">
                <text:list text:style-name="a899">
                  <text:list-item>
                    <text:p text:style-name="a898" text:class-names="" text:cond-style-name=""><text:span text:style-name="a896" text:class-names="">Reduce the average onboarding time.</text:span><text:span text:style-name="a897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Average processing time per employee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5" text:class-names="">~</text:span><text:span text:style-name="a906" text:class-names="">1h30</text:span><text:span text:style-name="a907" text:class-names=""><text:s text:c="1"/></text:span><text:span text:style-name="a908" text:class-names="">minutes per onboarding</text:span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Reduce to under 45 minutes</text:span></text:p>
                  </text:list-item>
                </text:list>
              </table:table-cell>
            </table:table-row>
            <table:table-row table:style-name="a916" table:default-cell-style-name="">
              <table:table-cell table:style-name="a921">
                <text:list text:style-name="a920">
                  <text:list-item>
                    <text:p text:style-name="a919" text:class-names="" text:cond-style-name=""><text:span text:style-name="a917" text:class-names="">Automate manual work tasks and reduce errors.</text:span><text:span text:style-name="a918" text:class-names=""/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% of manual steps automated<text:line-break/>% of errors in task completion</text:span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0% automation<text:line-break/>Error rate ~15% across steps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≥50% automation<text:line-break/>Error rate &lt;5%</text:span></text:p>
                  </text:list-item>
                </text:list>
              </table:table-cell>
            </table:table-row>
            <table:table-row table:style-name="a934" table:default-cell-style-name="">
              <table:table-cell table:style-name="a939">
                <text:list text:style-name="a938">
                  <text:list-item>
                    <text:p text:style-name="a937" text:class-names="" text:cond-style-name=""><text:span text:style-name="a935" text:class-names="">Automated reporting or dashboards</text:span><text:span text:style-name="a936" text:class-names=""/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>Availability of dashboards/KPIs<text:line-break/>Real-time insights</text:span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>No reporting or central visibility</text:span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>Centralized dashboard tracking real-time HR KPIs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2" draw:style-name="a984" draw:name="TextBox 15" svg:x="0.20663in" svg:y="4.73997in" svg:width="12.92006in" svg:height="2.76003in">
          <draw:text-box>
            <text:p text:style-name="a961" text:class-names="" text:cond-style-name=""><text:span text:style-name="a952" text:class-names="">FuturaCore’s manual HR onboarding process takes over 1h30 minutes per hire, with frequent delays, errors, and no central tracking. This project applies<text:s text:c="1"/></text:span><text:span text:style-name="a953" text:class-names="">Lean Six Sigma</text:span><text:span text:style-name="a954" text:class-names=""><text:s text:c="1"/>and<text:s text:c="1"/></text:span><text:span text:style-name="a955" text:class-names="">Python analysis</text:span><text:span text:style-name="a956" text:class-names=""><text:s text:c="1"/>to identify inefficiencies, then uses<text:s text:c="1"/></text:span><text:span text:style-name="a957" text:class-names="">UiPath</text:span><text:span text:style-name="a958" text:class-names=""><text:s text:c="1"/>to automate emails, folder creation, and Excel updates. <text:s text:c="1"/>A<text:s text:c="1"/></text:span><text:span text:style-name="a959" text:class-names="">Power BI dashboard</text:span><text:span text:style-name="a960" text:class-names=""><text:s text:c="1"/>provides real-time performance insights.</text:span></text:p>
            <text:p text:style-name="a963" text:class-names="" text:cond-style-name=""><text:span text:style-name="a962" text:class-names=""/></text:p>
            <text:p text:style-name="a965" text:class-names="" text:cond-style-name=""><text:span text:style-name="a964" text:class-names="">Expected results:</text:span></text:p>
            <text:list text:style-name="a968">
              <text:list-item>
                <text:p text:style-name="a967" text:class-names="" text:cond-style-name=""><text:span text:style-name="a966" text:class-names="">Cut onboarding time by 50%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Automate 50%+ of key tasks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Reduce error rate from 15% to &lt;5%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Deliver live dashboards for HR and leadership</text:span></text:p>
              </text:list-item>
            </text:list>
            <text:p text:style-name="a981" text:class-names="" text:cond-style-name=""><text:span text:style-name="a978" text:class-names="">A smarter, faster onboarding process—</text:span><text:span text:style-name="a979" text:class-names="">where process meets purpose</text:span><text:span text:style-name="a980" text:class-names="">.</text:span></text:p>
            <text:p text:style-name="a983" text:class-names="" text:cond-style-name=""><text:span text:style-name="a982" text:class-names=""/></text:p>
          </draw:text-box>
          <svg:title/>
          <svg:desc/>
        </draw:frame>
        <presentation:notes draw:style-name="a990">
          <draw:page-thumbnail draw:page-number="2" svg:x="0.75in" svg:y="1.25in" svg:width="6in" svg:height="3.375in" presentation:class="page" draw:id="id83" presentation:style-name="a985" draw:name="Slide Image Placeholder 1">
            <svg:title/>
            <svg:desc/>
          </draw:page-thumbnail>
          <draw:frame draw:id="id84" presentation:style-name="a98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989" draw:name="Slide Number Placeholder 3" svg:x="4.24826in" svg:y="9.49826in" svg:width="3.25in" svg:height="0.50174in">
            <draw:text-box>
              <text:p text:style-name="a988" text:class-names="" text:cond-style-name=""><text:span text:style-name="a9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91" draw:master-page-name="Master1-Layout7-blank-Blank" presentation:presentation-page-layout-name="Master1-PPL7" draw:id="Slide-258">
        <draw:frame draw:id="id86" draw:style-name="a994" draw:name="TextBox 2" svg:x="5.41337in" svg:y="0.81181in" svg:width="1.31329in" svg:height="0.40391in">
          <draw:text-box>
            <text:p text:style-name="a993" text:class-names="" text:cond-style-name=""><text:span text:style-name="a992" text:class-names="">Measure</text:span></text:p>
          </draw:text-box>
          <svg:title/>
          <svg:desc/>
        </draw:frame>
        <draw:frame draw:id="id87" draw:style-name="a995" draw:name="Picture 3" svg:x="12.11762in" svg:y="0in" svg:width="1.21571in" svg:height="1.21571in" style:rel-width="scale" style:rel-height="scale">
          <draw:image xlink:href="media/image2.png" xlink:type="simple" xlink:show="embed" xlink:actuate="onLoad"/>
          <svg:title/>
          <svg:desc>A logo for a company

AI-generated content may be incorrect.</svg:desc>
        </draw:frame>
        <draw:g draw:name="Diagram1" draw:id="id98" draw:style-name="a1120">
          <svg:title/>
          <svg:desc/>
          <draw:custom-shape svg:x="0.96513in" svg:y="1.26106in" svg:width="2.05091in" svg:height="0.44094in" draw:id="id88" draw:style-name="a1000">
            <svg:title/>
            <svg:desc/>
            <text:p text:style-name="a998" text:class-names="" text:cond-style-name=""><text:span text:style-name="a996" text:class-names="">Suppliers</text:span><text:span text:style-name="a997" text:class-names=""/></text:p>
            <draw:enhanced-geometry xmlns:dr3d="urn:oasis:names:tc:opendocument:xmlns:dr3d:1.0" draw:type="non-primitive" svg:viewBox="0 0 1875355 403200" draw:enhanced-path="M 0 0 L 1875355 0 1875355 403200 0 4032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403200"/>
              <draw:equation draw:name="f8" draw:formula="0 * ?f5 / 1875355"/>
              <draw:equation draw:name="f9" draw:formula="0 * ?f4 / 403200"/>
              <draw:equation draw:name="f10" draw:formula="1875355 * ?f5 / 1875355"/>
              <draw:equation draw:name="f11" draw:formula="403200 * ?f4 / 4032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6513in" svg:y="1.702in" svg:width="2.05091in" svg:height="3.62652in" draw:id="id89" draw:style-name="a1018">
            <svg:title/>
            <svg:desc/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1" text:class-names="">New Hire</text:span><text:span text:style-name="a1002" text:class-names=""/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IT/Systems Admin <text:s text:c="2"/>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Hiring Manager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Compliance Team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4" text:class-names=""><text:s text:c="1"/>HR Department <text:s text:c="1"/></text:span><text:span text:style-name="a101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75355 3316088" draw:enhanced-path="M 0 0 L 1875355 0 1875355 3316088 0 331608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3316088"/>
              <draw:equation draw:name="f8" draw:formula="0 * ?f5 / 1875355"/>
              <draw:equation draw:name="f9" draw:formula="0 * ?f4 / 3316088"/>
              <draw:equation draw:name="f10" draw:formula="1875355 * ?f5 / 1875355"/>
              <draw:equation draw:name="f11" draw:formula="3316088 * ?f4 / 331608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0317in" svg:y="1.26106in" svg:width="2.05091in" svg:height="0.44094in" draw:id="id90" draw:style-name="a1025">
            <svg:title/>
            <svg:desc/>
            <text:p text:style-name="a1023" text:class-names="" text:cond-style-name=""><text:span text:style-name="a1019" text:class-names="">I</text:span><text:span text:style-name="a1020" text:class-names="">m</text:span><text:span text:style-name="a1021" text:class-names="">puts</text:span><text:span text:style-name="a1022" text:class-names=""/></text:p>
            <draw:enhanced-geometry xmlns:dr3d="urn:oasis:names:tc:opendocument:xmlns:dr3d:1.0" draw:type="non-primitive" svg:viewBox="0 0 1875355 403200" draw:enhanced-path="M 0 0 L 1875355 0 1875355 403200 0 4032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403200"/>
              <draw:equation draw:name="f8" draw:formula="0 * ?f5 / 1875355"/>
              <draw:equation draw:name="f9" draw:formula="0 * ?f4 / 403200"/>
              <draw:equation draw:name="f10" draw:formula="1875355 * ?f5 / 1875355"/>
              <draw:equation draw:name="f11" draw:formula="403200 * ?f4 / 4032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0317in" svg:y="1.702in" svg:width="2.05091in" svg:height="3.62652in" draw:id="id91" draw:style-name="a1042">
            <svg:title/>
            <svg:desc/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6" text:class-names="">Personal documents (ID, proof of address, tax info) Reference check data<text:s text:c="1"/></text:span><text:span text:style-name="a1027" text:class-names=""/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0" text:class-names="">Company policy documents and regulatory requirements<text:s text:c="1"/></text:span><text:span text:style-name="a1031" text:class-names=""/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4" text:class-names="">Job role details, contract templates<text:s text:c="1"/></text:span><text:span text:style-name="a1035" text:class-names=""/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8" text:class-names="">Email and system provisioning platform<text:s text:c="1"/></text:span><text:span text:style-name="a103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75355 3316088" draw:enhanced-path="M 0 0 L 1875355 0 1875355 3316088 0 331608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3316088"/>
              <draw:equation draw:name="f8" draw:formula="0 * ?f5 / 1875355"/>
              <draw:equation draw:name="f9" draw:formula="0 * ?f4 / 3316088"/>
              <draw:equation draw:name="f10" draw:formula="1875355 * ?f5 / 1875355"/>
              <draw:equation draw:name="f11" draw:formula="3316088 * ?f4 / 331608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64121in" svg:y="1.26106in" svg:width="2.05091in" svg:height="0.44094in" draw:id="id92" draw:style-name="a1046">
            <svg:title/>
            <svg:desc/>
            <text:p text:style-name="a1044" text:class-names="" text:cond-style-name=""><text:span text:style-name="a1043" text:class-names="">Processo</text:span></text:p>
            <draw:enhanced-geometry xmlns:dr3d="urn:oasis:names:tc:opendocument:xmlns:dr3d:1.0" draw:type="non-primitive" svg:viewBox="0 0 1875355 403200" draw:enhanced-path="M 0 0 L 1875355 0 1875355 403200 0 4032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403200"/>
              <draw:equation draw:name="f8" draw:formula="0 * ?f5 / 1875355"/>
              <draw:equation draw:name="f9" draw:formula="0 * ?f4 / 403200"/>
              <draw:equation draw:name="f10" draw:formula="1875355 * ?f5 / 1875355"/>
              <draw:equation draw:name="f11" draw:formula="403200 * ?f4 / 4032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64121in" svg:y="1.702in" svg:width="2.05091in" svg:height="3.62652in" draw:id="id93" draw:style-name="a1067">
            <svg:title/>
            <svg:desc/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7" text:class-names="">Receive documents, verify and assess compliance<text:s text:c="1"/></text:span><text:span text:style-name="a1048" text:class-names=""/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1" text:class-names=""><text:s text:c="1"/>Enter data into system, review credentials<text:s text:c="1"/></text:span><text:span text:style-name="a1052" text:class-names=""/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5" text:class-names=""><text:s text:c="1"/>Complete compliance checks and background screening<text:s text:c="1"/></text:span><text:span text:style-name="a1056" text:class-names=""/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59" text:class-names="">Generate offer letter, send and track signature<text:s text:c="1"/></text:span><text:span text:style-name="a1060" text:class-names=""/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3" text:class-names=""><text:s text:c="1"/>Provision accounts, setup folders, assign roles<text:s text:c="1"/></text:span><text:span text:style-name="a106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75355 3316088" draw:enhanced-path="M 0 0 L 1875355 0 1875355 3316088 0 331608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3316088"/>
              <draw:equation draw:name="f8" draw:formula="0 * ?f5 / 1875355"/>
              <draw:equation draw:name="f9" draw:formula="0 * ?f4 / 3316088"/>
              <draw:equation draw:name="f10" draw:formula="1875355 * ?f5 / 1875355"/>
              <draw:equation draw:name="f11" draw:formula="3316088 * ?f4 / 331608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97925in" svg:y="1.26106in" svg:width="2.05091in" svg:height="0.44094in" draw:id="id94" draw:style-name="a1072">
            <svg:title/>
            <svg:desc/>
            <text:p text:style-name="a1070" text:class-names="" text:cond-style-name=""><text:span text:style-name="a1068" text:class-names="">Outputs</text:span><text:span text:style-name="a1069" text:class-names=""/></text:p>
            <draw:enhanced-geometry xmlns:dr3d="urn:oasis:names:tc:opendocument:xmlns:dr3d:1.0" draw:type="non-primitive" svg:viewBox="0 0 1875355 403200" draw:enhanced-path="M 0 0 L 1875355 0 1875355 403200 0 4032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403200"/>
              <draw:equation draw:name="f8" draw:formula="0 * ?f5 / 1875355"/>
              <draw:equation draw:name="f9" draw:formula="0 * ?f4 / 403200"/>
              <draw:equation draw:name="f10" draw:formula="1875355 * ?f5 / 1875355"/>
              <draw:equation draw:name="f11" draw:formula="403200 * ?f4 / 4032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97925in" svg:y="1.702in" svg:width="2.05091in" svg:height="3.62652in" draw:id="id95" draw:style-name="a1093">
            <svg:title/>
            <svg:desc/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3" text:class-names=""><text:s text:c="1"/>System credentials generated<text:s text:c="1"/></text:span><text:span text:style-name="a1074" text:class-names=""/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7" text:class-names="">Onboarding completed and employee activated</text:span><text:span text:style-name="a1078" text:class-names=""/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1" text:class-names="">Access granted to internal systems<text:s text:c="1"/></text:span><text:span text:style-name="a1082" text:class-names=""/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5" text:class-names="">Signed employment contract<text:s text:c="1"/></text:span><text:span text:style-name="a1086" text:class-names=""/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89" text:class-names=""><text:s text:c="1"/>Email, app access, and shared folders ready<text:s text:c="1"/></text:span><text:span text:style-name="a109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75355 3316088" draw:enhanced-path="M 0 0 L 1875355 0 1875355 3316088 0 331608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3316088"/>
              <draw:equation draw:name="f8" draw:formula="0 * ?f5 / 1875355"/>
              <draw:equation draw:name="f9" draw:formula="0 * ?f4 / 3316088"/>
              <draw:equation draw:name="f10" draw:formula="1875355 * ?f5 / 1875355"/>
              <draw:equation draw:name="f11" draw:formula="3316088 * ?f4 / 331608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31729in" svg:y="1.26106in" svg:width="2.05091in" svg:height="0.44094in" draw:id="id96" draw:style-name="a1098">
            <svg:title/>
            <svg:desc/>
            <text:p text:style-name="a1096" text:class-names="" text:cond-style-name=""><text:span text:style-name="a1094" text:class-names="">Customers</text:span><text:span text:style-name="a1095" text:class-names=""/></text:p>
            <draw:enhanced-geometry xmlns:dr3d="urn:oasis:names:tc:opendocument:xmlns:dr3d:1.0" draw:type="non-primitive" svg:viewBox="0 0 1875355 403200" draw:enhanced-path="M 0 0 L 1875355 0 1875355 403200 0 4032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403200"/>
              <draw:equation draw:name="f8" draw:formula="0 * ?f5 / 1875355"/>
              <draw:equation draw:name="f9" draw:formula="0 * ?f4 / 403200"/>
              <draw:equation draw:name="f10" draw:formula="1875355 * ?f5 / 1875355"/>
              <draw:equation draw:name="f11" draw:formula="403200 * ?f4 / 4032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31729in" svg:y="1.702in" svg:width="2.05091in" svg:height="3.62652in" draw:id="id97" draw:style-name="a1119">
            <svg:title/>
            <svg:desc/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099" text:class-names="">Internal HR team</text:span><text:span text:style-name="a1100" text:class-names=""/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3" text:class-names="">New employee (individual contributor)</text:span><text:span text:style-name="a1104" text:class-names=""/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7" text:class-names="">IT and Security Teams<text:s text:c="1"/></text:span><text:span text:style-name="a1108" text:class-names=""/>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1" text:class-names="">Manager and Line of Business (LOB)</text:span><text:span text:style-name="a1112" text:class-names=""/></text:p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5" text:class-names="">Employee and Department Teams<text:s text:c="1"/></text:span><text:span text:style-name="a111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75355 3316088" draw:enhanced-path="M 0 0 L 1875355 0 1875355 3316088 0 331608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75355"/>
              <draw:equation draw:name="f7" draw:formula="?f4 / 3316088"/>
              <draw:equation draw:name="f8" draw:formula="0 * ?f5 / 1875355"/>
              <draw:equation draw:name="f9" draw:formula="0 * ?f4 / 3316088"/>
              <draw:equation draw:name="f10" draw:formula="1875355 * ?f5 / 1875355"/>
              <draw:equation draw:name="f11" draw:formula="3316088 * ?f4 / 331608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99" draw:style-name="a1124" draw:name="TextBox 6" svg:x="5.35337in" svg:y="0.30692in" svg:width="1.31329in" svg:height="0.50488in">
          <draw:text-box>
            <text:p text:style-name="a1123" text:class-names="" text:cond-style-name=""><text:span text:style-name="a1121" text:class-names="">SIPOC</text:span><text:span text:style-name="a1122" text:class-names=""/></text:p>
          </draw:text-box>
          <svg:title/>
          <svg:desc/>
        </draw:frame>
        <draw:frame draw:id="id100" draw:style-name="a1125" draw:name="Picture 8" svg:x="0.04839in" svg:y="5.73344in" svg:width="13.23656in" svg:height="1.4596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1126" draw:master-page-name="Master1-Layout7-blank-Blank" presentation:presentation-page-layout-name="Master1-PPL7" draw:id="Slide-259">
        <draw:custom-shape svg:x="-0in" svg:y="0in" svg:width="13.33333in" svg:height="7.5in" draw:id="id101" draw:style-name="a1129" draw:name="Slide Background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1132" draw:name="TextBox 2" svg:x="3.37097in" svg:y="0.0446in" svg:width="1.48924in" svg:height="0.61828in">
          <draw:text-box>
            <text:p text:style-name="a1131" text:class-names="" text:cond-style-name=""><text:span text:style-name="a1130" text:class-names="">Analyze</text:span></text:p>
          </draw:text-box>
          <svg:title/>
          <svg:desc/>
        </draw:frame>
        <draw:custom-shape svg:x="7.41667in" svg:y="0in" svg:width="5.91666in" svg:height="7.50458in" draw:id="id103" draw:style-name="a1135" draw:name="Rectangle 14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1136" draw:name="Picture 5" svg:x="0.8001in" svg:y="3.15926in" svg:width="5.81647in" svg:height="3.63769in" style:rel-width="scale" style:rel-height="scale">
          <draw:image xlink:href="media/image5.png" xlink:type="simple" xlink:show="embed" xlink:actuate="onLoad"/>
          <svg:title/>
          <svg:desc>A graph of a distribution of processing time

AI-generated content may be incorrect.</svg:desc>
        </draw:frame>
        <draw:frame draw:id="id105" draw:style-name="a1137" draw:name="Picture 7" svg:x="8.06452in" svg:y="3.00312in" svg:width="4.84946in" svg:height="3.972in" style:rel-width="scale" style:rel-height="scale">
          <draw:image xlink:href="media/image6.png" xlink:type="simple" xlink:show="embed" xlink:actuate="onLoad"/>
          <svg:title/>
          <svg:desc>A graph with red squares

AI-generated content may be incorrect.</svg:desc>
        </draw:frame>
        <draw:frame draw:id="id106" draw:style-name="a1138" draw:name="Picture 3" svg:x="12.11762in" svg:y="0in" svg:width="1.21571in" svg:height="1.21571in" style:rel-width="scale" style:rel-height="scale">
          <draw:image xlink:href="media/image2.png" xlink:type="simple" xlink:show="embed" xlink:actuate="onLoad"/>
          <svg:title/>
          <svg:desc>A logo for a company

AI-generated content may be incorrect.</svg:desc>
        </draw:frame>
        <draw:frame draw:id="id107" draw:style-name="a1177" draw:name="TextBox 9" svg:x="0.50403in" svg:y="0.65411in" svg:width="5.63441in" svg:height="2.32246in">
          <draw:text-box>
            <text:p text:style-name="a1140" text:class-names="" text:cond-style-name=""><text:span text:style-name="a1139" text:class-names="">🧠 Distribution Highlights</text:span></text:p>
            <text:p text:style-name="a1142" text:class-names="" text:cond-style-name=""><text:span text:style-name="a1141" text:class-names=""/></text:p>
            <text:list text:style-name="a1146">
              <text:list-item>
                <text:p text:style-name="a1145" text:class-names="" text:cond-style-name=""><text:span text:style-name="a1143" text:class-names="">Most onboarding times:<text:s text:c="1"/></text:span><text:span text:style-name="a1144" text:class-names="">75–105 mins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0" text:class-names="">Average:</text:span><text:span text:style-name="a1151" text:class-names=""><text:s text:c="1"/>~90 mins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7" text:class-names="">Right-skewed</text:span><text:span text:style-name="a1158" text:class-names=""><text:s text:c="1"/>→ some cases exceed<text:s text:c="1"/></text:span><text:span text:style-name="a1159" text:class-names="">150 mins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5" text:class-names="">Outliers suggest<text:s text:c="1"/></text:span><text:span text:style-name="a1166" text:class-names="">manual delays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2" text:class-names="">Supports need for<text:s text:c="1"/></text:span><text:span text:style-name="a1173" text:class-names="">cycle time reduction</text:span><text:span text:style-name="a1174" text:class-names=""/></text:p>
              </text:list-item>
            </text:list>
          </draw:text-box>
          <svg:title/>
          <svg:desc/>
        </draw:frame>
        <draw:custom-shape svg:x="7.59005in" svg:y="0.62231in" svg:width="5.65726in" svg:height="2.38606in" draw:id="id108" draw:style-name="a1213" draw:name="Rectangle 1">
          <svg:title/>
          <svg:desc/>
          <text:p text:style-name="a1179" text:class-names="" text:cond-style-name=""><text:span text:style-name="a1178" text:class-names="">🧠 Processing Time Insights<text:s text:c="1"/></text:span></text:p>
          <text:p text:style-name="a1181" text:class-names="" text:cond-style-name=""><text:span text:style-name="a1180" text:class-names=""/></text:p>
          <text:list text:style-name="a1188">
            <text:list-item>
              <text:p text:style-name="a1187" text:class-names="" text:cond-style-name=""><text:span text:style-name="a1182" text:class-names="">Most onboardings</text:span><text:span text:style-name="a1183" text:class-names=""><text:s text:c="1"/>fall between<text:s text:c="1"/></text:span><text:span text:style-name="a1184" text:class-names="">75–105 mins</text:span><text:span text:style-name="a1185" text:class-names="">, with a<text:s text:c="1"/></text:span><text:span text:style-name="a1186" text:class-names="">center around 90 mins</text:span></text:p>
            </text:list-item>
          </text:list>
          <text:p text:style-name="a1190" text:class-names="" text:cond-style-name=""><text:span text:style-name="a1189" text:class-names=""/></text:p>
          <text:list text:style-name="a1195">
            <text:list-item>
              <text:p text:style-name="a1194" text:class-names="" text:cond-style-name=""><text:span text:style-name="a1191" text:class-names="">Right-skewed shape</text:span><text:span text:style-name="a1192" text:class-names=""><text:s text:c="1"/>shows a few extreme cases taking<text:s text:c="1"/></text:span><text:span text:style-name="a1193" text:class-names="">150+ mins</text:span></text:p>
            </text:list-item>
          </text:list>
          <text:list text:style-name="a1198">
            <text:list-item>
              <text:p text:style-name="a1197" text:class-names="" text:cond-style-name=""><text:span text:style-name="a1196" text:class-names=""/></text:p>
            </text:list-item>
          </text:list>
          <text:list text:style-name="a1202">
            <text:list-item>
              <text:p text:style-name="a1201" text:class-names="" text:cond-style-name=""><text:span text:style-name="a1199" text:class-names="">These outliers suggest potential<text:s text:c="1"/></text:span><text:span text:style-name="a1200" text:class-names="">bottlenecks</text:span></text:p>
            </text:list-item>
          </text:list>
          <text:list text:style-name="a1205">
            <text:list-item>
              <text:p text:style-name="a1204" text:class-names="" text:cond-style-name=""><text:span text:style-name="a1203" text:class-names=""/></text:p>
            </text:list-item>
          </text:list>
          <text:list text:style-name="a1210">
            <text:list-item>
              <text:p text:style-name="a1209" text:class-names="" text:cond-style-name=""><text:span text:style-name="a1206" text:class-names="">Supports the goal of<text:s text:c="1"/></text:span><text:span text:style-name="a1207" text:class-names="">cycle time reduction</text:span><text:span text:style-name="a1208" text:class-names=""><text:s text:c="1"/>and targeted automation</text:span></text:p>
            </text:list-item>
          </text:list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214" draw:master-page-name="Master1-Layout7-blank-Blank" presentation:presentation-page-layout-name="Master1-PPL7" draw:id="Slide-262">
        <draw:custom-shape svg:x="1.22581in" svg:y="3.75in" svg:width="9.70688in" svg:height="0in" draw:id="id109" draw:style-name="a1218" draw:name="Line 2">
          <svg:title/>
          <svg:desc/>
          <text:p text:style-name="a1216" text:class-names="" text:cond-style-name=""><text:span text:style-name="a12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6049in" svg:y="3.75in" svg:width="2.51969in" svg:height="2.44094in" draw:id="id110" draw:style-name="a1221" draw:name="Line 3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4001in" svg:y="3.75in" svg:width="2.51969in" svg:height="2.44094in" draw:id="id111" draw:style-name="a1224" draw:name="Line 4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6049in" svg:y="1.54528in" svg:width="1.73228in" svg:height="2.20472in" draw:id="id112" draw:style-name="a1227" draw:name="Line 5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36127in" svg:y="1.54528in" svg:width="1.73228in" svg:height="2.20472in" draw:id="id113" draw:style-name="a1230" draw:name="Line 6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156in" svg:y="0.99409in" svg:width="1.96811in" svg:height="0.55079in" draw:id="id114" draw:style-name="a1234" draw:name="CustomShape 7">
          <svg:title/>
          <svg:desc/>
          <text:p text:style-name="a1233" text:class-names="" text:cond-style-name=""><text:span text:style-name="a1231" text:class-names="">Materials</text:span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3765in" svg:y="0.99409in" svg:width="1.96811in" svg:height="0.55079in" draw:id="id115" draw:style-name="a1238" draw:name="CustomShape 8">
          <svg:title/>
          <svg:desc/>
          <text:p text:style-name="a1237" text:class-names="" text:cond-style-name=""><text:span text:style-name="a1235" text:class-names="">People</text:span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156in" svg:y="6.19094in" svg:width="1.96811in" svg:height="0.55079in" draw:id="id116" draw:style-name="a1242" draw:name="CustomShape 9">
          <svg:title/>
          <svg:desc/>
          <text:p text:style-name="a1241" text:class-names="" text:cond-style-name=""><text:span text:style-name="a1239" text:class-names="">Process</text:span><text:span text:style-name="a12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9513in" svg:y="6.19094in" svg:width="1.96811in" svg:height="0.55079in" draw:id="id117" draw:style-name="a1246" draw:name="CustomShape 10">
          <svg:title/>
          <svg:desc/>
          <text:p text:style-name="a1245" text:class-names="" text:cond-style-name=""><text:span text:style-name="a1243" text:class-names="">Technology</text:span><text:span text:style-name="a1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187in" svg:y="2.82739in" svg:width="1.96811in" svg:height="1.81063in" draw:id="id118" draw:style-name="a1254" draw:name="CustomShape 11">
          <svg:title/>
          <svg:desc/>
          <text:p text:style-name="a1248" text:class-names="" text:cond-style-name=""><text:span text:style-name="a1247" text:class-names="">HR Onboarding<text:s text:c="1"/></text:span></text:p>
          <text:p text:style-name="a1250" text:class-names="" text:cond-style-name=""><text:span text:style-name="a1249" text:class-names="">Process<text:s text:c="1"/></text:span></text:p>
          <text:p text:style-name="a1253" text:class-names="" text:cond-style-name=""><text:span text:style-name="a1251" text:class-names="">Improvement</text:span><text:span text:style-name="a1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8955in" svg:y="2.41142in" svg:width="2.4796in" svg:height="0in" draw:id="id119" draw:style-name="a1258" draw:name="Line 12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66205in" svg:y="3.43504in" svg:width="2.4945in" svg:height="0in" draw:id="id120" draw:style-name="a1262" draw:name="Line 13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3066in" svg:y="4.30047in" svg:width="2.67717in" svg:height="0in" draw:id="id121" draw:style-name="a1266" draw:name="Line 14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77072in" svg:y="5.46285in" svg:width="2.59843in" svg:height="0.01944in" draw:id="id122" draw:style-name="a1270" draw:name="Line 15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7403in" svg:y="2.24703in" svg:width="3.16879in" svg:height="0.0112in" draw:id="id123" draw:style-name="a1274" draw:name="Line 16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31385in" svg:y="3.3563in" svg:width="2.46474in" svg:height="0.01079in" draw:id="id124" draw:style-name="a1278" draw:name="Line 17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39121in" svg:y="4.45866in" svg:width="2.85983in" svg:height="0.02147in" draw:id="id125" draw:style-name="a1282" draw:name="Line 18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9425in" svg:y="5.56102in" svg:width="2.95443in" svg:height="0in" draw:id="id126" draw:style-name="a1286" draw:name="Line 19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7" draw:style-name="a1290" draw:name="TextBox 19" svg:x="1.76465in" svg:y="2.1034in" svg:width="2.71653in" svg:height="0.30293in">
          <draw:text-box>
            <text:p text:style-name="a1289" text:class-names="" text:cond-style-name=""><text:span text:style-name="a1287" text:class-names="">Duplicate documents requested</text:span><text:span text:style-name="a1288" text:class-names=""/></text:p>
          </draw:text-box>
          <svg:title/>
          <svg:desc/>
        </draw:frame>
        <draw:frame draw:id="id128" draw:style-name="a1294" draw:name="TextBox 20" svg:x="2.71465in" svg:y="3.18245in" svg:width="2.4796in" svg:height="0.30293in">
          <draw:text-box>
            <text:p text:style-name="a1293" text:class-names="" text:cond-style-name=""><text:span text:style-name="a1291" text:class-names="">Missing or incomplete forms</text:span><text:span text:style-name="a1292" text:class-names=""/></text:p>
          </draw:text-box>
          <svg:title/>
          <svg:desc/>
        </draw:frame>
        <draw:frame draw:id="id129" draw:style-name="a1298" draw:name="TextBox 21" svg:x="4.70379in" svg:y="1.94465in" svg:width="3.26772in" svg:height="0.30293in">
          <draw:text-box>
            <text:p text:style-name="a1297" text:class-names="" text:cond-style-name=""><text:span text:style-name="a1295" text:class-names="">High dependency on manual follow-ups</text:span><text:span text:style-name="a1296" text:class-names=""/></text:p>
          </draw:text-box>
          <svg:title/>
          <svg:desc/>
        </draw:frame>
        <draw:frame draw:id="id130" draw:style-name="a1302" draw:name="TextBox 22" svg:x="6.39121in" svg:y="3.07962in" svg:width="2.30865in" svg:height="0.30293in">
          <draw:text-box>
            <text:p text:style-name="a1301" text:class-names="" text:cond-style-name=""><text:span text:style-name="a1299" text:class-names="">Lack of standardised training</text:span><text:span text:style-name="a1300" text:class-names=""/></text:p>
          </draw:text-box>
          <svg:title/>
          <svg:desc/>
        </draw:frame>
        <draw:frame draw:id="id131" draw:style-name="a1306" draw:name="TextBox 23" svg:x="3.0287in" svg:y="4.05215in" svg:width="2.7712in" svg:height="0.30293in">
          <draw:text-box>
            <text:p text:style-name="a1305" text:class-names="" text:cond-style-name=""><text:span text:style-name="a1303" text:class-names="">No centralised checklist or SOP</text:span><text:span text:style-name="a1304" text:class-names=""/></text:p>
          </draw:text-box>
          <svg:title/>
          <svg:desc/>
        </draw:frame>
        <draw:frame draw:id="id132" draw:style-name="a1310" draw:name="TextBox 24" svg:x="1.69094in" svg:y="5.24188in" svg:width="3.07366in" svg:height="0.30293in">
          <draw:text-box>
            <text:p text:style-name="a1309" text:class-names="" text:cond-style-name=""><text:span text:style-name="a1307" text:class-names="">Redundant steps across locations</text:span><text:span text:style-name="a1308" text:class-names=""/></text:p>
          </draw:text-box>
          <svg:title/>
          <svg:desc/>
        </draw:frame>
        <draw:frame draw:id="id133" draw:style-name="a1314" draw:name="TextBox 25" svg:x="6.53135in" svg:y="4.18338in" svg:width="2.76117in" svg:height="0.30293in">
          <draw:text-box>
            <text:p text:style-name="a1313" text:class-names="" text:cond-style-name=""><text:span text:style-name="a1311" text:class-names="">No automation tools used initially</text:span><text:span text:style-name="a1312" text:class-names=""/></text:p>
          </draw:text-box>
          <svg:title/>
          <svg:desc/>
        </draw:frame>
        <draw:frame draw:id="id134" draw:style-name="a1318" draw:name="TextBox 26" svg:x="5.08825in" svg:y="5.29933in" svg:width="3.29179in" svg:height="0.30293in">
          <draw:text-box>
            <text:p text:style-name="a1317" text:class-names="" text:cond-style-name=""><text:span text:style-name="a1315" text:class-names="">Limited tech awareness among HR staff</text:span><text:span text:style-name="a1316" text:class-names=""/></text:p>
          </draw:text-box>
          <svg:title/>
          <svg:desc/>
        </draw:frame>
        <draw:custom-shape svg:x="6.31385in" svg:y="2.82739in" svg:width="2.04724in" svg:height="0in" draw:id="id135" draw:style-name="a1322" draw:name="Line 19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6" draw:style-name="a1325" draw:name="TextBox 29" svg:x="6.29916in" svg:y="2.57086in" svg:width="1.99622in" svg:height="0.30293in">
          <draw:text-box>
            <text:p text:style-name="a1324" text:class-names="" text:cond-style-name=""><text:span text:style-name="a1323" text:class-names="">Unclear task ownership</text:span></text:p>
          </draw:text-box>
          <svg:title/>
          <svg:desc/>
        </draw:frame>
        <draw:custom-shape svg:x="1.84667in" svg:y="4.92096in" svg:width="3.07366in" svg:height="0.0366in" draw:id="id137" draw:style-name="a1329" draw:name="Line 12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8" draw:style-name="a1332" draw:name="TextBox 32" svg:x="1.96829in" svg:y="4.67759in" svg:width="2.98419in" svg:height="0.30293in">
          <draw:text-box>
            <text:p text:style-name="a1331" text:class-names="" text:cond-style-name=""><text:span text:style-name="a1330" text:class-names="">Delays waiting on document approvals</text:span></text:p>
          </draw:text-box>
          <svg:title/>
          <svg:desc/>
        </draw:frame>
        <draw:custom-shape svg:x="1.58349in" svg:y="2.94579in" svg:width="3.19053in" svg:height="0.011in" draw:id="id139" draw:style-name="a1336" draw:name="Line 13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0" draw:style-name="a1339" draw:name="TextBox 35" svg:x="1.58349in" svg:y="2.70665in" svg:width="3.2476in" svg:height="0.30293in">
          <draw:text-box>
            <text:p text:style-name="a1338" text:class-names="" text:cond-style-name=""><text:span text:style-name="a1337" text:class-names="">Manual Excel entries with frequent errors</text:span></text:p>
          </draw:text-box>
          <svg:title/>
          <svg:desc/>
        </draw:frame>
        <draw:custom-shape svg:x="5.58427in" svg:y="4.98669in" svg:width="3.06837in" svg:height="0.00599in" draw:id="id141" draw:style-name="a1343" draw:name="Line 19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2" draw:style-name="a1346" draw:name="TextBox 38" svg:x="5.59663in" svg:y="4.75408in" svg:width="3.10145in" svg:height="0.30293in">
          <draw:text-box>
            <text:p text:style-name="a1345" text:class-names="" text:cond-style-name=""><text:span text:style-name="a1344" text:class-names="">Limited tech awareness among HR staff</text:span></text:p>
          </draw:text-box>
          <svg:title/>
          <svg:desc/>
        </draw:frame>
        <draw:frame draw:id="id143" draw:style-name="a1349" draw:name="TextBox 39" svg:x="0.27541in" svg:y="0.23498in" svg:width="1.48924in" svg:height="0.61828in">
          <draw:text-box>
            <text:p text:style-name="a1348" text:class-names="" text:cond-style-name=""><text:span text:style-name="a1347" text:class-names="">Analyze</text:span></text:p>
          </draw:text-box>
          <svg:title/>
          <svg:desc/>
        </draw:frame>
      </draw:page>
      <draw:page draw:name="Slide5" draw:style-name="a1350" draw:master-page-name="Master1-Layout7-blank-Blank" presentation:presentation-page-layout-name="Master1-PPL7" draw:id="Slide-260">
        <draw:frame draw:id="id144" draw:style-name="a1353" draw:name="TextBox 2" svg:x="0.31054in" svg:y="0.11635in" svg:width="1.25935in" svg:height="0.43757in">
          <draw:text-box>
            <text:p text:style-name="a1352" text:class-names="" text:cond-style-name=""><text:span text:style-name="a1351" text:class-names="">Improve</text:span></text:p>
          </draw:text-box>
          <svg:title/>
          <svg:desc/>
        </draw:frame>
        <draw:frame draw:id="id145" draw:style-name="a1354" draw:name="Picture 3" svg:x="12.11762in" svg:y="0in" svg:width="1.21571in" svg:height="1.21571in" style:rel-width="scale" style:rel-height="scale">
          <draw:image xlink:href="media/image2.png" xlink:type="simple" xlink:show="embed" xlink:actuate="onLoad"/>
          <svg:title/>
          <svg:desc>A logo for a company

AI-generated content may be incorrect.</svg:desc>
        </draw:frame>
        <draw:frame draw:id="id146" draw:style-name="a1355" draw:name="Picture 5" svg:x="4.16667in" svg:y="0in" svg:width="5in" svg:height="7.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1356" draw:master-page-name="Master1-Layout7-blank-Blank" presentation:presentation-page-layout-name="Master1-PPL7" draw:id="Slide-261">
        <draw:frame draw:id="id147" draw:style-name="a1359" draw:name="TextBox 2" svg:x="0.30479in" svg:y="0.2501in" svg:width="1.21571in" svg:height="0.40391in">
          <draw:text-box>
            <text:p text:style-name="a1358" text:class-names="" text:cond-style-name=""><text:span text:style-name="a1357" text:class-names="">Control</text:span></text:p>
          </draw:text-box>
          <svg:title/>
          <svg:desc/>
        </draw:frame>
        <draw:frame draw:id="id148" draw:style-name="a1360" draw:name="Picture 3" svg:x="12.11762in" svg:y="0in" svg:width="1.21571in" svg:height="1.21571in" style:rel-width="scale" style:rel-height="scale">
          <draw:image xlink:href="media/image2.png" xlink:type="simple" xlink:show="embed" xlink:actuate="onLoad"/>
          <svg:title/>
          <svg:desc>A logo for a company

AI-generated content may be incorrect.</svg:desc>
        </draw:frame>
        <draw:frame draw:id="id149" draw:name="Table 4" svg:x="0.91265in" svg:y="1.75401in" svg:width="11.1192in" svg:height="5.19223in">
          <table:table table:style-name="a1361" table:template-name="{638B1855-1B75-4FBE-930C-398BA8C253C6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62" table:default-cell-style-name=""/>
            <table:table-column table:style-name="a1363" table:default-cell-style-name=""/>
            <table:table-column table:style-name="a1364" table:default-cell-style-name=""/>
            <table:table-column table:style-name="a1365" table:default-cell-style-name=""/>
            <table:table-row table:style-name="a1366" table:default-cell-style-name="">
              <table:table-cell table:style-name="a1371">
                <text:list text:style-name="a1370">
                  <text:list-item>
                    <text:p text:style-name="a1369" text:class-names="" text:cond-style-name=""><text:span text:style-name="a1367" text:class-names="">Area</text:span><text:span text:style-name="a1368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2" text:class-names="">Control Activity</text:span><text:span text:style-name="a1373" text:class-names=""/></text:p>
                  </text:list-item>
                </text:list>
              </table:table-cell>
              <table:table-cell table:style-name="a1381">
                <text:list text:style-name="a1380">
                  <text:list-item>
                    <text:p text:style-name="a1379" text:class-names="" text:cond-style-name=""><text:span text:style-name="a1377" text:class-names="">Frequency</text:span><text:span text:style-name="a1378" text:class-names=""/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2" text:class-names="">Owner</text:span><text:span text:style-name="a1383" text:class-names=""/></text:p>
                  </text:list-item>
                </text:list>
              </table:table-cell>
            </table:table-row>
            <table:table-row table:style-name="a1387" table:default-cell-style-name="">
              <table:table-cell table:style-name="a1391">
                <text:list text:style-name="a1390">
                  <text:list-item>
                    <text:p text:style-name="a1389" text:class-names="" text:cond-style-name=""><text:span text:style-name="a1388" text:class-names="">📋 Task Completion</text:span></text:p>
                  </text:list-item>
                </text:list>
              </table:table-cell>
              <table:table-cell table:style-name="a1395">
                <text:list text:style-name="a1394">
                  <text:list-item>
                    <text:p text:style-name="a1393" text:class-names="" text:cond-style-name=""><text:span text:style-name="a1392" text:class-names="">Automated checklist in UiPath with completion logs</text:span></text:p>
                  </text:list-item>
                </text:list>
              </table:table-cell>
              <table:table-cell table:style-name="a1399">
                <text:list text:style-name="a1398">
                  <text:list-item>
                    <text:p text:style-name="a1397" text:class-names="" text:cond-style-name=""><text:span text:style-name="a1396" text:class-names="">Daily</text:span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>HR Officers</text:span></text:p>
                  </text:list-item>
                </text:list>
              </table:table-cell>
            </table:table-row>
            <table:table-row table:style-name="a1404" table:default-cell-style-name=""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>📊 Dashboard Monitoring</text:span></text:p>
                  </text:list-item>
                </text:list>
              </table:table-cell>
              <table:table-cell table:style-name="a1412">
                <text:list text:style-name="a1411">
                  <text:list-item>
                    <text:p text:style-name="a1410" text:class-names="" text:cond-style-name=""><text:span text:style-name="a1409" text:class-names="">Power BI dashboard showing KPIs: avg time, delays, errors</text:span></text:p>
                  </text:list-item>
                </text:list>
              </table:table-cell>
              <table:table-cell table:style-name="a1416">
                <text:list text:style-name="a1415">
                  <text:list-item>
                    <text:p text:style-name="a1414" text:class-names="" text:cond-style-name=""><text:span text:style-name="a1413" text:class-names="">Weekly</text:span></text:p>
                  </text:list-item>
                </text:list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7" text:class-names="">HR Manager</text:span></text:p>
                  </text:list-item>
                </text:list>
              </table:table-cell>
            </table:table-row>
            <table:table-row table:style-name="a1421" table:default-cell-style-name="">
              <table:table-cell table:style-name="a1425">
                <text:list text:style-name="a1424">
                  <text:list-item>
                    <text:p text:style-name="a1423" text:class-names="" text:cond-style-name=""><text:span text:style-name="a1422" text:class-names="">🧪 Data Validation</text:span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6" text:class-names="">Spot-check onboarding data entries for accuracy</text:span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Biweekly</text:span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>QA Specialist</text:span></text:p>
                  </text:list-item>
                </text:list>
              </table:table-cell>
            </table:table-row>
            <table:table-row table:style-name="a1438" table:default-cell-style-name=""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>💬 Feedback Loop</text:span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>HR team feedback on bottlenecks or new errors</text:span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>Monthly</text:span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>HR Lead</text:span></text:p>
                  </text:list-item>
                </text:list>
              </table:table-cell>
            </table:table-row>
            <table:table-row table:style-name="a1455" table:default-cell-style-name="">
              <table:table-cell table:style-name="a1459">
                <text:list text:style-name="a1458">
                  <text:list-item>
                    <text:p text:style-name="a1457" text:class-names="" text:cond-style-name=""><text:span text:style-name="a1456" text:class-names="">🧠 Training &amp; SOP Review</text:span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60" text:class-names="">Update process guide/checklist based on findings</text:span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4" text:class-names="">Quarterly</text:span></text:p>
                  </text:list-item>
                </text:list>
              </table:table-cell>
              <table:table-cell table:style-name="a1471">
                <text:list text:style-name="a1470">
                  <text:list-item>
                    <text:p text:style-name="a1469" text:class-names="" text:cond-style-name=""><text:span text:style-name="a1468" text:class-names="">L&amp;D Coordinator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50" draw:style-name="a1476" draw:name="TextBox 6" svg:x="0.91265in" svg:y="1.1425in" svg:width="2.74326in" svg:height="0.40391in">
          <draw:text-box>
            <text:p text:style-name="a1475" text:class-names="" text:cond-style-name=""><text:span text:style-name="a1472" text:class-names="">🔧<text:s text:c="1"/></text:span><text:span text:style-name="a1473" text:class-names="">Control Measures</text:span><text:span text:style-name="a147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91">
      <style:table-cell-properties/>
      <style:text-properties fo:font-weight="bold" style:font-weight-asian="bold" style:font-weight-complex="bold"/>
    </style:style>
    <style:style style:family="table-cell" style:name="a804">
      <style:table-cell-properties fo:background-color="#4ea72e" fo:border-top="0.00347in solid #ffffff"/>
      <style:text-properties fo:font-weight="bold" style:font-weight-asian="bold" style:font-weight-complex="bold"/>
    </style:style>
    <style:style style:family="table-cell" style:name="a792">
      <style:table-cell-properties fo:background-color="#156082" fo:border-top="0.00347in solid #bcc5cd" fo:border-bottom="0.00347in solid #bcc5cd" fo:border-left="0.00347in solid #bcc5cd" fo:border-right="0.00347in solid #bcc5cd"/>
      <style:text-properties fo:color="#ffffff" fo:font-family="+mn-lt" style:font-family-asian="+mn-ea" style:font-family-complex="+mn-cs"/>
    </style:style>
    <style:style style:family="table-cell" style:name="a805">
      <style:table-cell-properties fo:background-color="#4ea72e" fo:border-right="0.00347in solid #ffffff"/>
      <style:text-properties fo:font-weight="bold" style:font-weight-asian="bold" style:font-weight-complex="bold"/>
    </style:style>
    <style:style style:family="table-cell" style:name="a793">
      <style:table-cell-properties fo:background-color="#ffffff"/>
    </style:style>
    <style:style style:family="table-cell" style:name="a806">
      <style:table-cell-properties fo:background-color="#4ea72e" fo:border-left="0.00347in solid #ffffff"/>
      <style:text-properties fo:font-weight="bold" style:font-weight-asian="bold" style:font-weight-complex="bold"/>
    </style:style>
    <style:style style:family="table-cell" style:name="a794">
      <style:table-cell-properties fo:background-color="#ffffff"/>
    </style:style>
    <style:style style:family="table-cell" style:name="a795">
      <style:table-cell-properties fo:background-color="#156082" fo:border-bottom="0.00347in solid #ffffff"/>
      <style:text-properties fo:font-weight="bold" style:font-weight-asian="bold" style:font-weight-complex="bold"/>
    </style:style>
    <style:style style:family="table-cell" style:name="a796">
      <style:table-cell-properties fo:background-color="#156082" fo:border-top="0.00347in solid #ffffff"/>
      <style:text-properties fo:font-weight="bold" style:font-weight-asian="bold" style:font-weight-complex="bold"/>
    </style:style>
    <style:style style:family="table-cell" style:name="a797">
      <style:table-cell-properties fo:background-color="#156082" fo:border-right="0.00347in solid #ffffff"/>
      <style:text-properties fo:font-weight="bold" style:font-weight-asian="bold" style:font-weight-complex="bold"/>
    </style:style>
    <style:style style:family="table-cell" style:name="a798">
      <style:table-cell-properties fo:background-color="#156082" fo:border-left="0.00347in solid #ffffff"/>
      <style:text-properties fo:font-weight="bold" style:font-weight-asian="bold" style:font-weight-complex="bold"/>
    </style:style>
    <style:style style:family="table-cell" style:name="a799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80">
      <style:table-cell-properties fo:background-color="#ccd2d8"/>
    </style:style>
    <style:style style:family="table-cell" style:name="a781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transparent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86">
      <style:table-cell-properties fo:background-color="#156082"/>
    </style:style>
    <style:style style:family="table-cell" style:name="a787">
      <style:table-cell-properties fo:background-color="#156082"/>
    </style:style>
    <style:style style:family="table-cell" style:name="a788">
      <style:table-cell-properties fo:background-color="transparent" fo:border-bottom="0.02778in solid #156082"/>
      <style:text-properties fo:font-weight="bold" style:font-weight-asian="bold" style:font-weight-complex="bold"/>
    </style:style>
    <style:style style:family="table-cell" style:name="a789">
      <style:table-cell-properties fo:background-color="transparent" fo:border-top="0.05556in double #156082"/>
      <style:text-properties fo:font-weight="bold" style:font-weight-asian="bold" style:font-weight-complex="bold"/>
    </style:style>
    <style:style style:family="table-cell" style:name="a776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7">
      <style:table-cell-properties/>
    </style:style>
    <style:style style:family="table-cell" style:name="a778">
      <style:table-cell-properties fo:background-color="#ccd2d8"/>
    </style:style>
    <style:style style:family="table-cell" style:name="a779">
      <style:table-cell-properties/>
    </style:style>
    <style:style style:family="table-cell" style:name="a800">
      <style:table-cell-properties fo:background-color="#4ea72e" fo:border-top="0.00347in solid #c2d9be" fo:border-bottom="0.00347in solid #c2d9be" fo:border-left="0.00347in solid #c2d9be" fo:border-right="0.00347in solid #c2d9be"/>
      <style:text-properties fo:color="#ffffff" fo:font-family="+mn-lt" style:font-family-asian="+mn-ea" style:font-family-complex="+mn-cs"/>
    </style:style>
    <style:style style:family="table-cell" style:name="a801">
      <style:table-cell-properties fo:background-color="#ffffff"/>
    </style:style>
    <style:style style:family="table-cell" style:name="a802">
      <style:table-cell-properties fo:background-color="#ffffff"/>
    </style:style>
    <style:style style:family="table-cell" style:name="a790">
      <style:table-cell-properties/>
      <style:text-properties fo:font-weight="bold" style:font-weight-asian="bold" style:font-weight-complex="bold"/>
    </style:style>
    <style:style style:family="table-cell" style:name="a803">
      <style:table-cell-properties fo:background-color="#4ea72e" fo:border-bottom="0.00347in solid #ffffff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024" draw:style="linear" draw:angle="0" draw:start-color="#bc5dae" draw:end-color="#b73ca7" draw:start-intensity="100%" draw:end-intensity="100%"/>
    <draw:gradient draw:name="a1071" draw:style="linear" draw:angle="0" draw:start-color="#cc9ec5" draw:end-color="#c88ebf" draw:start-intensity="100%" draw:end-intensity="100%"/>
    <draw:gradient draw:name="a999" draw:style="linear" draw:angle="0" draw:start-color="#864b7d" draw:end-color="#79186e" draw:start-intensity="100%" draw:end-intensity="100%"/>
    <draw:gradient draw:name="a1097" draw:style="linear" draw:angle="0" draw:start-color="#bc5dae" draw:end-color="#b73ca7" draw:start-intensity="100%" draw:end-intensity="100%"/>
    <draw:gradient draw:name="a1045" draw:style="linear" draw:angle="0" draw:start-color="#cc9ec5" draw:end-color="#c88ebf" draw:start-intensity="100%" draw:end-intensity="100%"/>
    <draw:marker draw:name="a1321" svg:viewBox="0 0 20 30" svg:d="m10 0-10 30h20z"/>
    <draw:marker draw:name="a1261" svg:viewBox="0 0 20 30" svg:d="m10 0-10 30h20z"/>
    <draw:marker draw:name="a1257" svg:viewBox="0 0 20 30" svg:d="m10 0-10 30h20z"/>
    <draw:marker draw:name="a1265" svg:viewBox="0 0 20 30" svg:d="m10 0-10 30h20z"/>
    <draw:marker draw:name="a1273" svg:viewBox="0 0 20 30" svg:d="m10 0-10 30h20z"/>
    <draw:marker draw:name="a1328" svg:viewBox="0 0 20 30" svg:d="m10 0-10 30h20z"/>
    <draw:marker draw:name="a1269" svg:viewBox="0 0 20 30" svg:d="m10 0-10 30h20z"/>
    <draw:marker draw:name="a1335" svg:viewBox="0 0 20 30" svg:d="m10 0-10 30h20z"/>
    <draw:marker draw:name="a1281" svg:viewBox="0 0 20 30" svg:d="m10 0-10 30h20z"/>
    <draw:marker draw:name="a1342" svg:viewBox="0 0 20 30" svg:d="m10 0-10 30h20z"/>
    <draw:marker draw:name="a1277" svg:viewBox="0 0 20 30" svg:d="m10 0-10 30h20z"/>
    <draw:marker draw:name="a1285" svg:viewBox="0 0 20 30" svg:d="m10 0-10 30h20z"/>
    <draw:marker draw:name="a1217" svg:viewBox="0 0 20 30" svg:d="m10 0-10 30h20z"/>
    <draw:stroke-dash draw:name="a813" draw:display-name="Dash" draw:style="rect" draw:dots1="1" draw:dots1-length="0.41667in" draw:dots2="0" draw:dots2-length="0in" draw:distance="0.41667in"/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  <table:table-template table:name="{BC89EF96-8CEA-46FF-86C4-4CE0E7609802}">
      <table:first-row table:style-name="a788" table:paragraph-style-name=""/>
      <table:last-row table:style-name="a789" table:paragraph-style-name=""/>
      <table:first-column table:style-name="a790" table:paragraph-style-name=""/>
      <table:last-column table:style-name="a791" table:paragraph-style-name=""/>
      <table:body table:style-name="a785" table:paragraph-style-name=""/>
      <table:odd-rows table:style-name="a787" table:paragraph-style-name=""/>
      <table:odd-columns table:style-name="a786" table:paragraph-style-name=""/>
    </table:table-template>
    <table:table-template table:name="{5940675A-B579-460E-94D1-54222C63F5DA}">
      <table:body table:style-name="a799" table:paragraph-style-name=""/>
    </table:table-template>
    <table:table-template table:name="{638B1855-1B75-4FBE-930C-398BA8C253C6}">
      <table:first-row table:style-name="a803" table:paragraph-style-name=""/>
      <table:last-row table:style-name="a804" table:paragraph-style-name=""/>
      <table:first-column table:style-name="a805" table:paragraph-style-name=""/>
      <table:last-column table:style-name="a806" table:paragraph-style-name=""/>
      <table:body table:style-name="a800" table:paragraph-style-name=""/>
      <table:odd-rows table:style-name="a802" table:paragraph-style-name=""/>
      <table:odd-columns table:style-name="a801" table:paragraph-style-name=""/>
    </table:table-template>
    <table:table-template table:name="{D113A9D2-9D6B-4929-AA2D-F23B5EE8CBE7}">
      <table:first-row table:style-name="a795" table:paragraph-style-name=""/>
      <table:last-row table:style-name="a796" table:paragraph-style-name=""/>
      <table:first-column table:style-name="a797" table:paragraph-style-name=""/>
      <table:last-column table:style-name="a798" table:paragraph-style-name=""/>
      <table:body table:style-name="a792" table:paragraph-style-name=""/>
      <table:odd-rows table:style-name="a794" table:paragraph-style-name=""/>
      <table:odd-columns table:style-name="a79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mila de Santa Rosa Kavanagh</meta:initial-creator>
    <dc:creator>Camila de Santa Rosa Kavanagh</dc:creator>
    <meta:creation-date>2025-04-24T09:24:18Z</meta:creation-date>
    <dc:date>2025-04-25T10:37:42Z</dc:date>
    <meta:editing-cycles>5</meta:editing-cycles>
    <meta:editing-duration>PT0S</meta:editing-duration>
    <meta:document-statistic meta:paragraph-count="134" meta:word-count="615"/>
  </office:meta>
</office:document-meta>
</file>